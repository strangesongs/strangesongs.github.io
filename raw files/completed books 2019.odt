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officeooo:rsid="001aa111" officeooo:paragraph-rsid="001aa111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officeooo:rsid="001b8a95" officeooo:paragraph-rsid="001b8a95" fo:background-color="transparent" style:font-name-asian="Calibri1" style:font-size-asian="11pt" style:font-name-complex="Calibri1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officeooo:rsid="001d5d68" fo:background-color="transparent" style:font-name-asian="Calibri1" style:font-size-asian="11pt" style:font-name-complex="Calibri1"/>
    </style:style>
    <style:style style:name="P5" style:family="paragraph" style:parent-style-name="Standard" style:master-pag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 style:page-number="auto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officeooo:rsid="001d5d68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0.1917in" fo:text-align="start" style:justify-single-word="false" fo:text-indent="0in" style:auto-text-indent="false"/>
      <style:text-properties style:use-window-font-color="true" style:font-name="Calibri" fo:font-size="11pt" fo:letter-spacing="normal" officeooo:rsid="001faf7d" officeooo:paragraph-rsid="001faf7d" fo:background-color="transparent" style:font-name-asian="Calibri1" style:font-size-asian="11pt" style:font-name-complex="Calibri1"/>
    </style:style>
    <style:style style:name="T1" style:family="text">
      <style:text-properties officeooo:rsid="001e8078"/>
    </style:style>
    <style:style style:name="T2" style:family="text">
      <style:text-properties officeooo:rsid="001fa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leted books</text:p>
      <text:p text:style-name="P1">the new jim crow by michelle alexander</text:p>
      <text:p text:style-name="P1">trans* <text:s/>by jack halberstam</text:p>
      <text:p text:style-name="P1">horror in architecture by josh camaroff and ong ker-shing</text:p>
      <text:p text:style-name="P1">shock value by john waters</text:p>
      <text:p text:style-name="P2">giovanni’s room by james baldwin</text:p>
      <text:p text:style-name="P2">hell’s angels by hunter s thompson</text:p>
      <text:p text:style-name="P2">the SCUM manifesto by valerie solanas</text:p>
      <text:p text:style-name="P2">safe spaces by christina hanhardt</text:p>
      <text:p text:style-name="P3">the warmth of other suns by isabel wilkerson</text:p>
      <text:p text:style-name="P1"><text:s/></text:p>
      <text:p text:style-name="P4">FILM LIST</text:p>
      <text:p text:style-name="P4">“the killing of a chinese bookie” d. cassavettes 1976 (5.24.19)</text:p>
      <text:p text:style-name="P4">“the love witch” <text:span text:style-name="T1">d. anna biller 2016 (5.25.19)</text:span></text:p>
      <text:p text:style-name="P4">“<text:span text:style-name="T1">strange days” d. kathryn bigelow 1995</text:span></text:p>
      <text:p text:style-name="P4">“<text:span text:style-name="T1">born in flames” d. lizzie borden 1983</text:span></text:p>
      <text:p text:style-name="P7">“Charulata” d. satyajit ray, 1964 (6.23.19)</text:p>
      <text:p text:style-name="P4">“<text:span text:style-name="T2">bullitt” d. peter yates, 1968 (6.29.19)</text:span></text:p>
      <text:p text:style-name="P4">“<text:span text:style-name="T2">pendulum” d. george schaefer 1968 (6.29.1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19:40:05.821000000</dc:date>
    <meta:editing-duration>PT27M28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9" meta:word-count="108" meta:character-count="664" meta:non-whitespace-character-count="572"/>
  </office:meta>
</office:document-meta>
</file>