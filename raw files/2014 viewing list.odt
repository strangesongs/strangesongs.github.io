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</office:font-face-decls>
  <office:automatic-styles>
    <style:style style:name="P1" style:family="paragraph" style:parent-style-name="Standard">
      <style:text-properties style:font-name="Calibri1" fo:font-size="12pt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Calibri1" fo:font-size="12pt" fo:letter-spacing="normal" fo:font-style="normal" fo:font-weight="normal" style:font-size-asian="12pt" style:font-size-complex="12pt"/>
    </style:style>
    <style:style style:name="T1" style:family="text">
      <style:text-properties fo:language="en" fo:country="none"/>
    </style:style>
    <style:style style:name="T2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MAESTRO: KING OF THE COWBOY ARTISTS (d. Les Blank, 1995, USA) 1/1/2014</text:p>
      <text:p text:style-name="Standard">PICNIC AT HANGING ROCK (d. Peter Weir, 1975, Australia) 1/2/2014</text:p>
      <text:p text:style-name="Standard"><text:bookmark text:name="__DdeLink__0_1558673807"/>THE HORSE'S MOUTH (d. Ronald Neame, 1958, United Kingdom) 1/3/2014</text:p>
      <text:p text:style-name="Standard">AUTUMN SONATA (d. Ingmar Bergman, 1978, Sweden) 1/5/2014</text:p>
      <text:p text:style-name="Standard">ANCHORMAN 2: THE LEGEND CONTINUES (d. Adam McKay, 2013, United States) 1/12/2014</text:p>
      <text:p text:style-name="Standard">MY DINNER WITH ANDRE – d. Louis Malle, 1981, United States (1/20/2014)</text:p>
      <text:p text:style-name="Standard">THE PERVERT'S GUIDE TO IDEOLOGY – d. Sophie Fiennes, 2013, United States (1/25/2014)</text:p>
      <text:p text:style-name="Standard">METROPOLITAN – d. Whit Stillman, 1990, United States – 1/30/2014*</text:p>
      <text:p text:style-name="Standard">SCHIZOPOLIS -- d. Steven Soderbergh, 1996, United States – 1/31/2014</text:p>
      <text:p text:style-name="Standard">BAD LIEUTENANT (d. Abel Ferrera, 1992, United States) 1/31/2014</text:p>
      <text:p text:style-name="Standard">HARD EIGHT (d. Paul Thomas Anderson, 1996, United States) 2/2/2014</text:p>
      <text:p text:style-name="Standard">SYNECDOCHE, NEW YORK (d. Charlie Kaufman, 2009, United States) 2/2/2014*</text:p>
      <text:p text:style-name="Standard">HOUSE (d. Nobuhiko Obayashi, 1977, Japan) 2/3/2014*</text:p>
      <text:p text:style-name="Standard">THE HOURS (d. Stephen Daldry, 2002, United States) 2/3/2014*</text:p>
      <text:p text:style-name="Standard">O BROTHER, WHERE ART THOU? (d. Joel Coen, 2000, United States) 2/7/2014*</text:p>
      <text:p text:style-name="Standard">BABY MAMA (d. Michael McCullers, 2008, United States)*</text:p>
      <text:p text:style-name="Standard">INTOLERABLE CRUELTY (d. Joel Coen, 2003, United States)</text:p>
      <text:p text:style-name="Standard"><text:span text:style-name="T1">THREE COLORS: BLUE (d. </text:span>Krzysztof Kieślowski, 1993, France)*</text:p>
      <text:p text:style-name="Standard">THREE COLORS: WHITE (d. <text:s/>Krzysztof Kieślowski, 1993, France)*</text:p>
      <text:p text:style-name="Standard">FARGO (d. Joel Coen, 1996, United States)*</text:p>
      <text:p text:style-name="Standard">SING A SONG OF SEX (d. Nagisa Oshima, 1967, Japan)</text:p>
      <text:p text:style-name="Standard">THE LADY EVE (d. Preston Sturges, 1941, United States)</text:p>
      <text:p text:style-name="Standard">WAITING FOR GUFFMAN (d. Christopher Guest, 1996, United States)*</text:p>
      <text:p text:style-name="Standard">CLUE (d. Jonathan Lynn, 1985, United States)*</text:p>
      <text:p text:style-name="Standard">NEBRASKA (d. Alexander Payne, 2013, United States) 3/7/2014</text:p>
      <text:p text:style-name="Standard"><text:span text:style-name="T1">DALLAS BUYERS CLUB (d. </text:span>Jean-Marc Vallée , 2013, United States) 3/7/2014</text:p>
      <text:p text:style-name="Standard">GREENBURG (d. Noah Baumbach, 2010, United States) 3/8/2014</text:p>
      <text:p text:style-name="Standard">MARGOT AT THE WEDDING (d. Noah Baumbach, 2007, United States) 3/8/14</text:p>
      <text:p text:style-name="Standard">WISE BLOOD (d. John Huston, 1979, United States) 3/9/2014</text:p>
      <text:p text:style-name="Standard">INSIDE LLEWYN DAVIS (d. Joel and Ethan Coen, 2013, United States) 3/15/2014</text:p>
      <text:p text:style-name="Standard">VALERIE AND HER WEEK OF WONDERS (d. Jaromil Jireš, 1970, Czechoslovakia) 3/15/2014</text:p>
      <text:p text:style-name="Standard">BARTON FINK (d. Joel and Ethan Coen, 1991, United States) 3/15/2014</text:p>
      <text:p text:style-name="Standard"><text:s/>A WIND FROM THE SOUTH (d. Daniel Petrie, 1955, USA) 3/16/2014</text:p>
      <text:p text:style-name="Standard">REQUIEM FOR A HEAVYWEIGHT (d. Ralph Nelson, 1956, USA) 3/18/2014</text:p>
      <text:p text:style-name="Standard">THE WOLF OF WALL STREET (d. Martin Scorsese, 2013, USA) 3/25/14</text:p>
      <text:p text:style-name="Standard">BRAND UPON THE BRAIN! (d. Guy Maddin, 2006, Canada) 3/27/14</text:p>
      <text:p text:style-name="Standard">DEFENDING YOUR LIFE (d. Albert Brooks, 1991, United States) 3/29/14</text:p>
      <text:p text:style-name="Standard">UNFAITHFULLY YOURS (d. Preston Sturges, 1948, United States) 3/23/2014</text:p>
      <text:p text:style-name="Standard">MY MAN GODFREY (d. Gregory La Cava, 1938, United States) 3/29/14</text:p>
      <text:p text:style-name="Standard">PUBLIC SPEAKING (d. Martin Scorsese, 2010, United States) 3/23/2014</text:p>
      <text:p text:style-name="Standard">WOMEN ON THE VERGE OF A NERVOUS BREAKDOWN (d. Pedro Almodovar, 1988, Spain) <text:soft-page-break/>3/21/2014</text:p>
      <text:p text:style-name="Standard">HEAVEN CAN WAIT (d. Ernst Lubitsch, 1943, United States) 4/12/2014</text:p>
      <text:p text:style-name="Standard">LOUIE BLUIE (d. Terry Zwigoff, 1985, United States) 4/12/2014</text:p>
      <text:p text:style-name="Standard">THE WAR ROOM (d. D.A. Pennebaker and Chris Hegedus, 1993, United States) 4/15/2014</text:p>
      <text:p text:style-name="Standard">THE NAKED KISS (d. Samuel Fuller, 1964, United States) 4/12/2014</text:p>
      <text:p text:style-name="Standard">CITIZEN RUTH (d. Alexander Payne, 1996, United States) 4/19/2014</text:p>
      <text:p text:style-name="Standard">REAL LIFE (d. Albert Brooks, 1979, United States) 4/19/2014</text:p>
      <text:p text:style-name="Standard">THE LAST DAYS OF DISCO (d. Whit Stillman, 1998, United States) 4/28/2014</text:p>
      <text:p text:style-name="Standard">SUBMARINE (d. Richard Ayoade, 2010, United Kingdom) 5/10/2014</text:p>
      <text:p text:style-name="Standard">WE OWN THE NIGHT (d. James Gray, 2007, United States) 5/17/2014</text:p>
      <text:p text:style-name="Standard">INTERIOR. LEATHER. BAR. (d. James Franco and Travis Morrison, 2013, United States) 5/17/2014</text:p>
      <text:p text:style-name="Standard">TO BE OR NOT TO BE (d. Ernst Lubitsch, 1942, United States) 5/25/2014</text:p>
      <text:p text:style-name="Standard">ALL ABOUT EVE (d. Joseph Mankiewicz, 1950, United States) 6/7/2014</text:p>
      <text:p text:style-name="Standard">THE GRAND BUDAPEST HOTEL (d. Wes Anderson, 2014, United States) 6/12/2014</text:p>
      <text:p text:style-name="Standard">BRINING UP BABY (d. Howard Hawks, 1938, United States) 6/17/2014</text:p>
      <text:p text:style-name="Standard">HIS GIRL FRIDAY (d. Howard Hawks, 1940, United States) 6/18/2014*</text:p>
      <text:p text:style-name="Standard">(UNTITLED) (d. Jonathan Parker, 2009, United States) 8/9/2014</text:p>
      <text:p text:style-name="Standard">ANNA KARENINA (d. Joe Wright, 2012, United States) 8/1/2014</text:p>
      <text:p text:style-name="Standard">HAROLD AND MAUDE (d. Hal Ashby, 1971, United States) 8/1/2014*</text:p>
      <text:p text:style-name="Standard">GHOST IN THE SHELL (d. Mamoru Oshii, 1995, Japan)*</text:p>
      <text:p text:style-name="Standard">NAKED LUNCH (d. David Cronenberg, 1991, United States) 9/1/2014*</text:p>
      <text:p text:style-name="Standard">THE WHISPERER IN DARKNESS (d. Sean Branney, 2011, United States) 9/1/2014</text:p>
      <text:p text:style-name="Standard">NEVER LET ME GO (d. Mark Romanek, 2010, United Kingdom) 9/5/2014</text:p>
      <text:p text:style-name="Standard">THE COUNSELOR (d. Ridley Scott, 2013, United States) 9/6/2014</text:p>
      <text:p text:style-name="Standard">DAMSELS IN DISTRESS (d. Whit Stillman, 2012, United States) 9/6/2014</text:p>
      <text:p text:style-name="Standard">INTERVIEW WITH A VAMPIRE:THE VAMPIRE CHRONICLES (d. Neil Jordan, 1994, United States) 9/12/2014</text:p>
      <text:p text:style-name="Standard">PRIDE AND PREJUDICE (d. Joe Wright, 2005, United Kingdom) 9/14</text:p>
      <text:p text:style-name="Standard">AMADEUS (d. Milos Forman, 1984, United States) 9/15</text:p>
      <text:p text:style-name="Standard">TAMPOPO (d. Juzo Itami, 1986, Japan) 9/16</text:p>
      <text:p text:style-name="Standard">MALA NOCHE (d. Gus Van Sant, 1985, United States) 9/16</text:p>
      <text:p text:style-name="Standard">ANDRE GREGORY: BEFORE AND AFTER DINNER (d. Cindy Kleine, 2013, United States) 9/17</text:p>
      <text:p text:style-name="Standard">STAY (d. Marc Forster, 2005, United States) 9/23</text:p>
      <text:p text:style-name="Standard">SEX AND THE CITY: THE MOVIE (d. Michael Patrick King, 2005, United States) 9/21</text:p>
      <text:p text:style-name="Standard">CORALINE (d. Henry Selick, 2009, United States) 9/23/2014</text:p>
      <text:p text:style-name="Standard">THE FAMILY STONE (d. Thomas Bezucha, 2005, United States) 9/23/2014</text:p>
      <text:p text:style-name="Standard">RATATOUILLE (d. Brad Bird, 2007, United States) 9/24/2014</text:p>
      <text:p text:style-name="Standard">LIGHT GRADIENT (d. Jan Kruger, 2009, Germany) 9/26/2014</text:p>
      <text:p text:style-name="Standard">A BRIEF HISTORY OF TIME (d. Errol Morris, 1994, United States) 9/21/2014</text:p>
      <text:p text:style-name="Standard">INVESTIGATION OF A CITIZEN UNDER SUSPICION (d. Elio Petri, 1970, Italy) 10/9/2014</text:p>
      <text:p text:style-name="Standard">SENSE AND SENSIBILITY (d. Ang Lee, 1995, United Kingdom)</text:p>
      <text:p text:style-name="Standard"><text:soft-page-break/>THE MAGIC FLUTE (d. Ingmar Bergman, 1975, Sweden)</text:p>
      <text:p text:style-name="Standard">THE CORPSE BRIDE (d. Tim Burton and Mike Johnson, 2005, United States)</text:p>
      <text:p text:style-name="Standard">ELEVATOR TO THE GALLOWS (d. Louis Malle, 1957, France)</text:p>
      <text:p text:style-name="Standard">A LATE QUARTET (d. Yaron Zilberman, 2012, United States) 10/19</text:p>
      <text:p text:style-name="Standard">THE NOTEBOOK (d. János Szás, 2014, Hungary) 10/15</text:p>
      <text:p text:style-name="Standard">THE NEW WORLD (d. Terrence Malick, 2005, United States)* 10/22</text:p>
      <text:p text:style-name="Standard">ARMY OF SHADOWS (d. Jean-Pierre Melville, 1969, France)* 10/25</text:p>
      <text:p text:style-name="Standard">HER (d. Spike Jonze, 2013, United States) 11/1</text:p>
      <text:p text:style-name="Standard">SNOWPIERCER (d. Bong Joon-ho, 2013, United States) 11/1</text:p>
      <text:p text:style-name="Standard">NIGHTCRAWLER (d. Dan Gilroy, 2014, United States) 11/2</text:p>
      <text:p text:style-name="Standard">PLIMPTON! (d. Tom Bean and Luke Poling, 2014, United States) 11/26</text:p>
      <text:p text:style-name="Standard">RADIO DAYS (d. Woody Allen, 1987, United States) 11/15</text:p>
      <text:p text:style-name="Standard">GOODBYE TO LANGUAGE (d. Jean-Luc Godard, 2014, France/Switzerland) 11/19</text:p>
      <text:p text:style-name="P1">BIRDMAN (OR THE UNEXPECTED VIRTUE OF IGNORANCE) (d. <text:span text:style-name="T2">Alejandro González Iñárritu, 2014, United States)</text:span></text:p>
      <text:p text:style-name="P2">THE BALLAD OF GENESIS AND LADY JAYE (d. Marie Losier, 2012, United States)</text:p>
      <text:p text:style-name="P2">UNDER THE SKIN (d. Jonathan Glazer, 2013, United States) 12/6</text:p>
      <text:p text:style-name="P2">FEAR OF FEAR (d. Rainer Werner Fassbinder, 1975, Germany) 12/6</text:p>
      <text:p text:style-name="P2">CHINESE ROULETTE (d. Rainer Werner Fassbinder, 1976, Germany) 12/19</text:p>
      <text:p text:style-name="P2">ALTMAN (d. Ron Mann, 2014, United States) 12/21</text:p>
      <text:p text:style-name="P2">KEEP YOUR RIGHT UP! (d. Jean-Luc Godard, 1987, France) 12/20</text:p>
      <text:p text:style-name="P2">PORTRAIT OF JENNIE (d. d. William Dieterle, 1948, United States) 12/15</text:p>
      <text:p text:style-name="P2">THE BLUES ACCORDING TO LIGHTNIN' HOPKINS (d. Les Blank, 1968, United States) 12/28</text:p>
      <text:p text:style-name="P2">SPEND IT ALL (d. Les Blank, 1971, United States)</text:p>
      <text:p text:style-name="P2">THE STORY OF FILM (d. Mark Cousins, 2011, United Kingdom) all ye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en" style:country-asian="US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en" fo:country="US" fo:font-style="italic" style:letter-kerning="true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en" fo:country="US" style:letter-kerning="true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3in"/>
      </text:list-level-style-number>
      <text:list-level-style-number text:level="2" text:style-name="RTF_5f_Num_20_3_20_2" style:num-format="">
        <style:list-level-properties text:min-label-width="0.4in"/>
      </text:list-level-style-number>
      <text:list-level-style-number text:level="3" text:style-name="RTF_5f_Num_20_3_20_3" style:num-format="">
        <style:list-level-properties text:min-label-width="0.5in"/>
      </text:list-level-style-number>
      <text:list-level-style-number text:level="4" text:style-name="RTF_5f_Num_20_3_20_4" style:num-format="">
        <style:list-level-properties text:min-label-width="0.6in"/>
      </text:list-level-style-number>
      <text:list-level-style-number text:level="5" text:style-name="RTF_5f_Num_20_3_20_5" style:num-format="">
        <style:list-level-properties text:min-label-width="0.7in"/>
      </text:list-level-style-number>
      <text:list-level-style-number text:level="6" text:style-name="RTF_5f_Num_20_3_20_6" style:num-format="">
        <style:list-level-properties text:min-label-width="0.8in"/>
      </text:list-level-style-number>
      <text:list-level-style-number text:level="7" text:style-name="RTF_5f_Num_20_3_20_7" style:num-format="">
        <style:list-level-properties text:min-label-width="0.9in"/>
      </text:list-level-style-number>
      <text:list-level-style-number text:level="8" text:style-name="RTF_5f_Num_20_3_20_8" style:num-format="">
        <style:list-level-properties text:min-label-width="1in"/>
      </text:list-level-style-number>
      <text:list-level-style-number text:level="9" text:style-name="RTF_5f_Num_20_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7T16:45:53.44</dc:date>
    <dc:creator>Joshua Cretella</dc:creator>
    <meta:generator>OpenOffice/4.0.1$Win32 OpenOffice.org_project/401m5$Build-9714</meta:generator>
    <meta:editing-duration>P5DT15H15M3S</meta:editing-duration>
    <meta:editing-cycles>56</meta:editing-cycles>
    <meta:document-statistic meta:table-count="0" meta:image-count="0" meta:object-count="0" meta:page-count="3" meta:paragraph-count="104" meta:word-count="1138" meta:character-count="6958"/>
  </office:meta>
</office:document-meta>
</file>